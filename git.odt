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officeooo:rsid="001a0c6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. Install Git on Ubuntu</text:span></text:h>
      <text:p text:style-name="Text_20_body">First, open the Terminal. Update the package list by running <text:span text:style-name="Source_20_Text">sudo apt update</text:span>. Then, install Git using the command <text:span text:style-name="Source_20_Text">sudo apt install git -y</text:span>. To check if Git was installed successfully, type <text:span text:style-name="Source_20_Text">git --version</text:span>. You should see the version of Git installed.</text:p>
      <text:p text:style-name="Text_20_body">Next, configure Git with your name and email so that commits are associated with your identity. Run <text:span text:style-name="Source_20_Text">git config --global user.name "Your Name"</text:span> and <text:span text:style-name="Source_20_Text">git config --global user.email "youremail@example.com"</text:span>. You can check the configuration by typing <text:span text:style-name="Source_20_Text">git config --list</text:span>.</text:p>
      <text:p text:style-name="Horizontal_20_Line"/>
      <text:h text:style-name="Heading_20_2" text:outline-level="2"><text:span text:style-name="Strong_20_Emphasis">2. Create a Repository on GitHub</text:span></text:h>
      <text:p text:style-name="Text_20_body">Log in to GitHub and click <text:span text:style-name="Strong_20_Emphasis">New Repository</text:span>. Enter a name for your repository and choose whether it should be public or private. Do not initialize it with a README file, since you will push your local folder. After creating the repository, copy the repository URL provided by GitHub.</text:p>
      <text:p text:style-name="Horizontal_20_Line"/>
      <text:h text:style-name="Heading_20_2" text:outline-level="2"><text:span text:style-name="Strong_20_Emphasis">3. Prepare Your Local Folder</text:span></text:h>
      <text:p text:style-name="Text_20_body">Open the Terminal and navigate to the folder you want to push using the <text:span text:style-name="Source_20_Text">cd</text:span> command. For example, <text:span text:style-name="Source_20_Text">cd /home/username/my-project</text:span>.</text:p>
      <text:p text:style-name="Horizontal_20_Line"/>
      <text:h text:style-name="Heading_20_2" text:outline-level="2"><text:span text:style-name="Strong_20_Emphasis">4. Initialize Git in Your Folder</text:span></text:h>
      <text:p text:style-name="Text_20_body">Run the command <text:span text:style-name="Source_20_Text">git init</text:span> to turn your local folder into a Git repository. This will create a hidden <text:span text:style-name="Source_20_Text">.git</text:span> folder that tracks your project changes.</text:p>
      <text:p text:style-name="Horizontal_20_Line"/>
      <text:h text:style-name="Heading_20_2" text:outline-level="2"><text:span text:style-name="Strong_20_Emphasis">5. Add Files to Git</text:span></text:h>
      <text:p text:style-name="Text_20_body">Stage all the files in your folder by running <text:span text:style-name="Source_20_Text">git add .</text:span>. The <text:span text:style-name="Source_20_Text">.</text:span> means all files in the current folder.</text:p>
      <text:p text:style-name="Horizontal_20_Line"/>
      <text:h text:style-name="Heading_20_2" text:outline-level="2"><text:span text:style-name="Strong_20_Emphasis">6. Commit the Files</text:span></text:h>
      <text:p text:style-name="Text_20_body">Save a snapshot of your current folder by running <text:span text:style-name="Source_20_Text">git commit -m "Initial commit"</text:span>. The message inside quotes describes the commit.</text:p>
      <text:p text:style-name="Horizontal_20_Line"/>
      <text:h text:style-name="Heading_20_2" text:outline-level="2"><text:soft-page-break/><text:span text:style-name="Strong_20_Emphasis">7. Connect Your Local Folder to GitHub</text:span></text:h>
      <text:p text:style-name="Text_20_body">Run <text:span text:style-name="Source_20_Text">git remote add origin &lt;repository URL&gt;</text:span> to link your local repository to the GitHub repository. Replace <text:span text:style-name="Source_20_Text">&lt;repository URL&gt;</text:span> with the URL you copied from GitHub.</text:p>
      <text:p text:style-name="Horizontal_20_Line"/>
      <text:h text:style-name="Heading_20_2" text:outline-level="2"><text:span text:style-name="Strong_20_Emphasis">8. Push Your Folder to GitHub</text:span></text:h>
      <text:p text:style-name="Text_20_body">Set the branch name to main with <text:span text:style-name="Source_20_Text">git branch -M main</text:span>. Then, push your files to GitHub using <text:span text:style-name="Source_20_Text">git push -u origin main</text:span>.</text:p>
      <text:p text:style-name="Text_20_body"><text:span text:style-name="Strong_20_Emphasis">Note:</text:span> GitHub no longer allows account passwords for HTTPS. You must create a <text:span text:style-name="Strong_20_Emphasis">Personal Access Token (PAT)</text:span> in GitHub and use it as your password when prompted.</text:p>
      <text:p text:style-name="Horizontal_20_Line"/>
      <text:h text:style-name="Heading_20_2" text:outline-level="2"><text:span text:style-name="Strong_20_Emphasis">9. Create a Personal Access Token (PAT)</text:span></text:h>
      <text:list xml:id="list2200947207" text:style-name="L1">
        <text:list-item>
          <text:p text:style-name="P1">Go to GitHub → Settings → Developer Settings → Personal Access Tokens → Generate New Token.</text:p>
        </text:list-item>
        <text:list-item>
          <text:p text:style-name="P1">Give the token a name, set an expiration, and select the <text:span text:style-name="Source_20_Text">repo</text:span> scope.</text:p>
        </text:list-item>
        <text:list-item>
          <text:p text:style-name="P1">Click <text:span text:style-name="Strong_20_Emphasis">Generate Token</text:span> and copy it.</text:p>
        </text:list-item>
        <text:list-item>
          <text:p text:style-name="P1">When Git asks for your password during <text:span text:style-name="Source_20_Text">git push</text:span>, paste the token instead.</text:p>
        </text:list-item>
      </text:list>
      <text:p text:style-name="Horizontal_20_Line"/>
      <text:h text:style-name="Heading_20_2" text:outline-level="2"><text:span text:style-name="Strong_20_Emphasis">10. Save Credentials (Optional)</text:span></text:h>
      <text:p text:style-name="Text_20_body">To avoid entering the token every time, run <text:span text:style-name="Source_20_Text">git config --global credential.helper store</text:span>. Git will remember your token for future pushes.</text:p>
      <text:p text:style-name="Horizontal_20_Line"/>
      <text:h text:style-name="Heading_20_2" text:outline-level="2"><text:span text:style-name="Strong_20_Emphasis">11. Update Repository Later</text:span></text:h>
      <text:p text:style-name="Text_20_body">Whenever you make changes to your project:</text:p>
      <text:list xml:id="list3080729986" text:style-name="L2">
        <text:list-item>
          <text:p text:style-name="P2">Stage the changes: <text:span text:style-name="Source_20_Text">git add .</text:span></text:p>
        </text:list-item>
        <text:list-item>
          <text:p text:style-name="P2">Commit the changes: <text:span text:style-name="Source_20_Text">git commit -m "Update message"</text:span></text:p>
        </text:list-item>
        <text:list-item>
          <text:p text:style-name="P2">Push the updates to GitHub: <text:span text:style-name="Source_20_Text">git push</text:span></text:p>
        </text:list-item>
      </text:list>
      <text:p text:style-name="Text_20_body"><text:span text:style-name="T1">A</text:span>fter following these steps, your folder will be on GitHub, and you can update it anytim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1:19:12.008341857</meta:creation-date>
    <dc:date>2026-03-17T11:19:51.775164463</dc:date>
    <meta:editing-duration>PT40S</meta:editing-duration>
    <meta:editing-cycles>1</meta:editing-cycles>
    <meta:document-statistic meta:table-count="0" meta:image-count="0" meta:object-count="0" meta:page-count="2" meta:paragraph-count="31" meta:word-count="478" meta:character-count="2702" meta:non-whitespace-character-count="2267"/>
    <meta:generator>LibreOffice/7.3.7.2$Linux_X86_64 LibreOffice_project/30$Build-2</meta:generator>
  </office:meta>
</office:document-meta>
</file>