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Standard">GIT is a distributed version control system (VCS) used by developers to track changes in code,</text:p>
      <text:p text:style-name="Standard">collaborate with others, and manage different versions of a project. It was created in 2005 by Linus</text:p>
      <text:p text:style-name="Standard">Torvalds while developing the Linux kernel.</text:p>
      <text:p text:style-name="P2">What Git Does</text:p>
      <text:p text:style-name="Standard">Git helps you:</text:p>
      <text:p text:style-name="Standard"> Track changes in files over time</text:p>
      <text:p text:style-name="Standard"> Revert to previous versions if something breaks</text:p>
      <text:p text:style-name="Standard"> Work with multiple developers on the same project</text:p>
      <text:p text:style-name="Standard"/>
      <text:p text:style-name="Standard"> Create branches to experiment with new features without affecting the main code</text:p>
      <text:p text:style-name="Standard">ghp_5McFBo8yjAex6BlKnPdl70LjwMw3Jj3VSgy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0:40:25.904534753</meta:creation-date>
    <dc:date>2026-03-17T11:07:26.615386933</dc:date>
    <meta:editing-duration>PT27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86" meta:character-count="531" meta:non-whitespace-character-count="456"/>
  </office:meta>
</office:document-meta>
</file>