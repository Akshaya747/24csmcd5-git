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Git?</text:p>
      <text:p text:style-name="Standard">GIT is a distributed version control system (VCS) used by developers to track changes in code,</text:p>
      <text:p text:style-name="Standard">collaborate with others, and manage different versions of a project. It was created in 2005 by Linus</text:p>
      <text:p text:style-name="Standard">Torvalds while developing the Linux kernel.</text:p>
      <text:p text:style-name="P2">What Git Does</text:p>
      <text:p text:style-name="Standard">Git helps you:</text:p>
      <text:p text:style-name="Standard"> Track changes in files over time</text:p>
      <text:p text:style-name="Standard"> Revert to previous versions if something breaks</text:p>
      <text:p text:style-name="Standard"> Work with multiple developers on the same project</text:p>
      <text:p text:style-name="Standard"> Create branches to experiment with new features without affecting the main co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0:40:25.904534753</meta:creation-date>
    <dc:date>2026-03-17T10:41:37.307413201</dc:date>
    <meta:editing-duration>PT1M11S</meta:editing-duration>
    <meta:editing-cycles>1</meta:editing-cycles>
    <meta:document-statistic meta:table-count="0" meta:image-count="0" meta:object-count="0" meta:page-count="1" meta:paragraph-count="10" meta:word-count="85" meta:character-count="491" meta:non-whitespace-character-count="416"/>
    <meta:generator>LibreOffice/7.3.7.2$Linux_X86_64 LibreOffice_project/30$Build-2</meta:generator>
  </office:meta>
</office:document-meta>
</file>